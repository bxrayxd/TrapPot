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200000094A967CF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Display" svg:font-family="'Aptos Display'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JetBrains Mono NL" svg:font-family="'JetBrains Mono NL'" style:font-family-generic="modern" style:font-pitch="fixed"/>
    <style:font-face style:name="JetBrainsMono NF" svg:font-family="'JetBrainsMono NF'" style:font-pitch="fixed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JetBrains Mono NL" fo:font-size="20pt" style:font-size-asian="20pt" style:font-name-complex="JetBrains Mono NL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JetBrains Mono NL" fo:font-size="28pt" fo:font-weight="bold" style:font-size-asian="28pt" style:font-weight-asian="bold" style:font-name-complex="JetBrains Mono NL" style:font-size-complex="28pt" style:font-weight-complex="bold"/>
    </style:style>
    <style:style style:name="P4" style:family="paragraph" style:parent-style-name="Heading_20_1">
      <style:paragraph-properties fo:text-align="center" style:justify-single-word="false"/>
      <style:text-properties fo:font-size="48pt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style:font-name="JetBrains Mono NL" fo:font-size="28pt" style:font-size-asian="28pt" style:font-name-complex="JetBrains Mono NL" style:font-size-complex="28pt"/>
    </style:style>
    <style:style style:name="P6" style:family="paragraph" style:parent-style-name="Standard">
      <style:text-properties style:font-name="JetBrains Mono NL" fo:font-size="28pt" style:font-size-asian="28pt" style:font-name-complex="JetBrains Mono NL" style:font-size-complex="28pt"/>
    </style:style>
    <style:style style:name="P7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8" style:family="paragraph" style:parent-style-name="Contents_20_Heading">
      <style:text-properties style:font-name="JetBrainsMono NF"/>
    </style:style>
    <style:style style:name="P9" style:family="paragraph" style:parent-style-name="TOC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10" style:family="paragraph" style:parent-style-name="Normal">
      <style:text-properties style:font-name="JetBrainsMono NF" fo:font-size="36pt" style:font-size-asian="36pt" style:font-size-complex="36pt"/>
    </style:style>
    <style:style style:name="P11" style:family="paragraph" style:parent-style-name="Normal">
      <style:text-properties fo:font-size="36pt" style:font-size-asian="36pt" style:font-size-complex="36pt"/>
    </style:style>
    <style:style style:name="P12" style:family="paragraph" style:parent-style-name="Normal">
      <style:paragraph-properties fo:text-align="start" style:justify-single-word="false"/>
      <style:text-properties fo:font-size="16pt" officeooo:rsid="0017d397" officeooo:paragraph-rsid="0017d397" style:font-size-asian="14pt" style:font-size-complex="16pt"/>
    </style:style>
    <style:style style:name="T1" style:family="text">
      <style:text-properties style:font-name="JetBrainsMono N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7874in" svg:y="-1.2016in" svg:width="8.4992in" style:rel-width="scale" svg:height="1.5638in" style:rel-height="scale" draw:z-index="0"><draw:image xlink:href="Pictures/100000010000033200000094A967CF19.png" xlink:type="simple" xlink:show="embed" xlink:actuate="onLoad" draw:mime-type="image/png"/></draw:frame></text:p>
      <text:p text:style-name="P2"/>
      <text:p text:style-name="P2"/>
      <text:p text:style-name="P3"/>
      <text:p text:style-name="P3"/>
      <text:h text:style-name="P4" text:outline-level="1"><text:bookmark-start text:name="__RefHeading___Toc1278_804470557"/><text:bookmark-start text:name="_Toc212036650"/>Trap Pot<text:bookmark-end text:name="__RefHeading___Toc1278_804470557"/><text:bookmark-end text:name="_Toc212036650"/></text:h>
      <text:p text:style-name="P5">(IoT honey-pot system)</text:p>
      <text:p text:style-name="P5"/>
      <text:p text:style-name="P5"/>
      <text:p text:style-name="P5"/>
      <text:p text:style-name="P5">students:</text:p>
      <text:p text:style-name="P5"/>
      <text:p text:style-name="P5"/>
      <text:p text:style-name="P5"/>
      <text:p text:style-name="P5"/>
      <text:p text:style-name="P6"/>
      <text:h text:style-name="P7" text:outline-level="1"><text:bookmark-start text:name="__RefHeading___Toc1280_804470557"/><text:bookmark-start text:name="_Toc212036651"/><text:soft-page-break/>Certificate<text:bookmark-end text:name="__RefHeading___Toc1280_804470557"/><text:bookmark-end text:name="_Toc212036651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h text:style-name="P7" text:outline-level="1"><text:bookmark-start text:name="__RefHeading___Toc1282_804470557"/><text:bookmark-start text:name="_Toc212036652"/><text:soft-page-break/>Acknowledgement<text:bookmark-end text:name="__RefHeading___Toc1282_804470557"/><text:bookmark-end text:name="_Toc212036652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h text:style-name="P7" text:outline-level="1"><text:bookmark-start text:name="__RefHeading___Toc1284_804470557"/><text:bookmark-start text:name="_Toc212036653"/><text:soft-page-break/>Dedication<text:bookmark-end text:name="__RefHeading___Toc1284_804470557"/><text:bookmark-end text:name="_Toc212036653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h text:style-name="P7" text:outline-level="1"><text:bookmark-start text:name="__RefHeading___Toc1286_804470557"/><text:bookmark-start text:name="_Toc212036654"/><text:soft-page-break/>Abstract<text:bookmark-end text:name="__RefHeading___Toc1286_804470557"/><text:bookmark-end text:name="_Toc212036654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Standard"/>
      <text:p text:style-name="Standard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8"><text:soft-page-break/>Table of Contents</text:p>
          </text:index-title>
          <text:p text:style-name="P9"><text:a xlink:type="simple" xlink:href="#__RefHeading___Toc1278_804470557" office:name="Trap Pot" text:style-name="Index_20_Link" text:visited-style-name="Index_20_Link"><text:span text:style-name="T1">Trap Pot<text:tab/>1</text:span></text:a></text:p>
          <text:p text:style-name="P9"><text:a xlink:type="simple" xlink:href="#__RefHeading___Toc1280_804470557" office:name="Certificate" text:style-name="Index_20_Link" text:visited-style-name="Index_20_Link"><text:span text:style-name="T1">Certificate<text:tab/>2</text:span></text:a></text:p>
          <text:p text:style-name="P9"><text:a xlink:type="simple" xlink:href="#__RefHeading___Toc1282_804470557" office:name="Acknowledgement" text:style-name="Index_20_Link" text:visited-style-name="Index_20_Link"><text:span text:style-name="T1">Acknowledgement<text:tab/>3</text:span></text:a></text:p>
          <text:p text:style-name="P9"><text:a xlink:type="simple" xlink:href="#__RefHeading___Toc1284_804470557" office:name="Dedication" text:style-name="Index_20_Link" text:visited-style-name="Index_20_Link"><text:span text:style-name="T1">Dedication<text:tab/>4</text:span></text:a></text:p>
          <text:p text:style-name="P9"><text:a xlink:type="simple" xlink:href="#__RefHeading___Toc1286_804470557" office:name="Abstract" text:style-name="Index_20_Link" text:visited-style-name="Index_20_Link"><text:span text:style-name="T1">Abstract<text:tab/>5</text:span></text:a></text:p>
          <text:p text:style-name="P9"><text:a xlink:type="simple" xlink:href="#__RefHeading___Toc1288_804470557" office:name="Introduction" text:style-name="Index_20_Link" text:visited-style-name="Index_20_Link"><text:span text:style-name="T1">Introduction<text:tab/>7</text:span></text:a></text:p>
        </text:index-body>
      </text:table-of-content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7" text:outline-level="1"><text:bookmark-start text:name="__RefHeading___Toc1288_804470557"/><text:soft-page-break/>Introduction<text:bookmark-end text:name="__RefHeading___Toc1288_804470557"/></text:h>
      <text:p text:style-name="P12">1.1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Display" svg:font-family="'Aptos Display'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JetBrains Mono NL" svg:font-family="'JetBrains Mono NL'" style:font-family-generic="modern" style:font-pitch="fixed"/>
    <style:font-face style:name="JetBrainsMono NF" svg:font-family="'JetBrainsMono NF'" style:font-pitch="fixed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line-height="107%" fo:hyphenation-ladder-count="no-limit" fo:hyphenation-keep="auto" loext:hyphenation-keep-type="column" loext:hyphenation-keep-line="false" style:vertical-align="auto"/>
      <style:text-properties style:letter-kerning="false" style:language-asian="en" style:country-asian="US" style:font-name-complex="Times New Roman" style:font-family-complex="'Times New Roman'" style:font-family-generic-complex="roman" style:font-pitch-complex="variable" style:font-size-complex="16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style:contextual-spacing="false" fo:hyphenation-ladder-count="no-limit" fo:hyphenation-keep="auto" loext:hyphenation-keep-type="column" loext:hyphenation-keep-line="false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in" fo:margin-bottom="0.25in" style:contextual-spacing="true" fo:padding-left="0in" fo:padding-right="0in" fo:padding-top="0in" fo:padding-bottom="0.111in" fo:border-left="none" fo:border-right="none" fo:border-top="none" fo:border-bottom="0.51pt solid #156082" style:shadow="none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 style:shadow="none"/>
    </style:style>
    <style:style style:name="MT1" style:family="text">
      <style:text-properties fo:color="#404040" loext:opacity="100%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7f7f7f" loext:opacity="100%" fo:letter-spacing="0.0417in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text:span text:style-name="Default_20_Paragraph_20_Font"><text:span text:style-name="MT1">Trap Pot <text:s text:c="90"/>IT Department</text:span></text:span></text:p>
        <text:p text:style-name="Header"/>
      </style:header>
      <style:header-first>
        <text:p text:style-name="MP1"><text:span text:style-name="Default_20_Paragraph_20_Font"><text:span text:style-name="MT1">Trap Pot <text:s text:c="141"/>IT Department</text:span></text:span></text:p>
        <text:p text:style-name="Header"/>
      </style:header-first>
      <style:footer>
        <text:p text:style-name="MP2"><text:span text:style-name="Default_20_Paragraph_20_Font"><text:span text:style-name="MT2"><text:page-number text:select-page="current">7</text:page-number></text:span></text:span><text:span text:style-name="Default_20_Paragraph_20_Font"><text:span text:style-name="MT2"><text:s/>| </text:span></text:span><text:span text:style-name="Default_20_Paragraph_20_Font"><text:span text:style-name="MT3">Page</text:span></text:span></text:p>
        <text:p text:style-name="Footer"/>
      </style:footer>
      <style:footer-first>
        <text:p text:style-name="MP2"><text:span text:style-name="Default_20_Paragraph_20_Font"><text:span text:style-name="MT2"><text:page-number text:select-page="current">1</text:page-number></text:span></text:span><text:span text:style-name="Default_20_Paragraph_20_Font"><text:span text:style-name="MT2"><text:s/>| </text:span></text:span><text:span text:style-name="Default_20_Paragraph_20_Font"><text:span text:style-name="MT3">Page</text:span></text:span></text:p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  <dc:title>Trap Pot                                                                                                                                              IT Department</dc:title>
    <meta:creation-date>2025-10-22T13:42:00Z</meta:creation-date>
    <dc:date>2025-10-23T12:06:02.534612213</dc:date>
    <meta:editing-cycles>7</meta:editing-cycles>
    <meta:editing-duration>PT35M9S</meta:editing-duration>
    <meta:document-statistic meta:table-count="0" meta:image-count="1" meta:object-count="0" meta:page-count="7" meta:paragraph-count="20" meta:word-count="42" meta:character-count="483" meta:non-whitespace-character-count="229"/>
    <meta:template xlink:type="simple" xlink:actuate="onRequest" xlink:title="" xlink:href="Normal"/>
  </office:meta>
</office:document-meta>
</file>